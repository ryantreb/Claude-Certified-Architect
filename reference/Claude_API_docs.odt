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latform.claude.com/docs/en/intro" text:style-name="Internet_20_link" text:visited-style-name="Visited_20_Internet_20_Link">https://platform.claude.com/docs/en/intro</text:a></text:p>
      <text:p text:style-name="Standard"><text:a xlink:type="simple" xlink:href="https://platform.claude.com/docs/en/get-started" text:style-name="Internet_20_link" text:visited-style-name="Visited_20_Internet_20_Link">https://platform.claude.com/docs/en/get-started</text:a></text:p>
      <text:p text:style-name="Standard"><text:a xlink:type="simple" xlink:href="https://platform.claude.com/docs/en/build-with-claude/overview" text:style-name="Internet_20_link" text:visited-style-name="Visited_20_Internet_20_Link">https://platform.claude.com/docs/en/build-with-claude/overview</text:a></text:p>
      <text:p text:style-name="Standard"><text:a xlink:type="simple" xlink:href="https://platform.claude.com/docs/en/build-with-claude/working-with-messages" text:style-name="Internet_20_link" text:visited-style-name="Visited_20_Internet_20_Link">https://platform.claude.com/docs/en/build-with-claude/working-with-messages</text:a></text:p>
      <text:p text:style-name="Standard"><text:a xlink:type="simple" xlink:href="https://platform.claude.com/docs/en/build-with-claude/handling-stop-reasons" text:style-name="Internet_20_link" text:visited-style-name="Visited_20_Internet_20_Link">https://platform.claude.com/docs/en/build-with-claude/handling-stop-reasons</text:a></text:p>
      <text:p text:style-name="Standard"><text:a xlink:type="simple" xlink:href="https://platform.claude.com/docs/en/build-with-claude/refusals-and-fallback" text:style-name="Internet_20_link" text:visited-style-name="Visited_20_Internet_20_Link">https://platform.claude.com/docs/en/build-with-claude/refusals-and-fallback</text:a></text:p>
      <text:p text:style-name="Standard"><text:a xlink:type="simple" xlink:href="https://platform.claude.com/docs/en/build-with-claude/fallback-credit" text:style-name="Internet_20_link" text:visited-style-name="Visited_20_Internet_20_Link">https://platform.claude.com/docs/en/build-with-claude/fallback-credit</text:a></text:p>
      <text:p text:style-name="Standard"><text:a xlink:type="simple" xlink:href="https://platform.claude.com/docs/en/build-with-claude/extended-thinking" text:style-name="Internet_20_link" text:visited-style-name="Visited_20_Internet_20_Link">https://platform.claude.com/docs/en/build-with-claude/extended-thinking</text:a></text:p>
      <text:p text:style-name="Standard"><text:a xlink:type="simple" xlink:href="https://platform.claude.com/docs/en/build-with-claude/adaptive-thinking" text:style-name="Internet_20_link" text:visited-style-name="Visited_20_Internet_20_Link">https://platform.claude.com/docs/en/build-with-claude/adaptive-thinking</text:a></text:p>
      <text:p text:style-name="Standard"><text:a xlink:type="simple" xlink:href="https://platform.claude.com/docs/en/build-with-claude/effort" text:style-name="Internet_20_link" text:visited-style-name="Visited_20_Internet_20_Link">https://platform.claude.com/docs/en/build-with-claude/effort</text:a></text:p>
      <text:p text:style-name="Standard"><text:a xlink:type="simple" xlink:href="https://platform.claude.com/docs/en/build-with-claude/task-budgets" text:style-name="Internet_20_link" text:visited-style-name="Visited_20_Internet_20_Link">https://platform.claude.com/docs/en/build-with-claude/task-budgets</text:a></text:p>
      <text:p text:style-name="Standard"><text:a xlink:type="simple" xlink:href="https://platform.claude.com/docs/en/build-with-claude/fast-mode" text:style-name="Internet_20_link" text:visited-style-name="Visited_20_Internet_20_Link">https://platform.claude.com/docs/en/build-with-claude/fast-mode</text:a></text:p>
      <text:p text:style-name="Standard"><text:a xlink:type="simple" xlink:href="https://platform.claude.com/docs/en/build-with-claude/structured-outputs" text:style-name="Internet_20_link" text:visited-style-name="Visited_20_Internet_20_Link">https://platform.claude.com/docs/en/build-with-claude/structured-outputs</text:a></text:p>
      <text:p text:style-name="Standard"><text:a xlink:type="simple" xlink:href="https://platform.claude.com/docs/en/build-with-claude/citations" text:style-name="Internet_20_link" text:visited-style-name="Visited_20_Internet_20_Link">https://platform.claude.com/docs/en/build-with-claude/citations</text:a></text:p>
      <text:p text:style-name="Standard"><text:a xlink:type="simple" xlink:href="https://platform.claude.com/docs/en/build-with-claude/streaming" text:style-name="Internet_20_link" text:visited-style-name="Visited_20_Internet_20_Link">https://platform.claude.com/docs/en/build-with-claude/streaming</text:a></text:p>
      <text:p text:style-name="Standard"><text:a xlink:type="simple" xlink:href="https://platform.claude.com/docs/en/build-with-claude/batch-processing" text:style-name="Internet_20_link" text:visited-style-name="Visited_20_Internet_20_Link">https://platform.claude.com/docs/en/build-with-claude/batch-processing</text:a></text:p>
      <text:p text:style-name="Standard"><text:a xlink:type="simple" xlink:href="https://platform.claude.com/docs/en/build-with-claude/search-results" text:style-name="Internet_20_link" text:visited-style-name="Visited_20_Internet_20_Link">https://platform.claude.com/docs/en/build-with-claude/search-results</text:a></text:p>
      <text:p text:style-name="Standard"><text:a xlink:type="simple" xlink:href="https://platform.claude.com/docs/en/test-and-evaluate/strengthen-guardrails/handle-streaming-refusals" text:style-name="Internet_20_link" text:visited-style-name="Visited_20_Internet_20_Link">https://platform.claude.com/docs/en/test-and-evaluate/strengthen-guardrails/handle-streaming-refusals</text:a></text:p>
      <text:p text:style-name="Standard"><text:a xlink:type="simple" xlink:href="https://platform.claude.com/docs/en/build-with-claude/multilingual-support" text:style-name="Internet_20_link" text:visited-style-name="Visited_20_Internet_20_Link">https://platform.claude.com/docs/en/build-with-claude/multilingual-support</text:a></text:p>
      <text:p text:style-name="Standard"><text:a xlink:type="simple" xlink:href="https://platform.claude.com/docs/en/build-with-claude/embeddings" text:style-name="Internet_20_link" text:visited-style-name="Visited_20_Internet_20_Link">https://platform.claude.com/docs/en/build-with-claude/embeddings</text:a></text:p>
      <text:p text:style-name="Standard"><text:a xlink:type="simple" xlink:href="https://platform.claude.com/docs/en/agents-and-tools/tool-use/overview" text:style-name="Internet_20_link" text:visited-style-name="Visited_20_Internet_20_Link">https://platform.claude.com/docs/en/agents-and-tools/tool-use/overview</text:a></text:p>
      <text:p text:style-name="Standard"><text:a xlink:type="simple" xlink:href="https://platform.claude.com/docs/en/agents-and-tools/tool-use/how-tool-use-works" text:style-name="Internet_20_link" text:visited-style-name="Visited_20_Internet_20_Link">https://platform.claude.com/docs/en/agents-and-tools/tool-use/how-tool-use-works</text:a></text:p>
      <text:p text:style-name="Standard"><text:a xlink:type="simple" xlink:href="https://platform.claude.com/docs/en/agents-and-tools/tool-use/build-a-tool-using-agent" text:style-name="Internet_20_link" text:visited-style-name="Visited_20_Internet_20_Link">https://platform.claude.com/docs/en/agents-and-tools/tool-use/build-a-tool-using-agent</text:a></text:p>
      <text:p text:style-name="Standard"><text:a xlink:type="simple" xlink:href="https://platform.claude.com/docs/en/agents-and-tools/tool-use/define-tools" text:style-name="Internet_20_link" text:visited-style-name="Visited_20_Internet_20_Link">https://platform.claude.com/docs/en/agents-and-tools/tool-use/define-tools</text:a></text:p>
      <text:p text:style-name="Standard"><text:a xlink:type="simple" xlink:href="https://platform.claude.com/docs/en/agents-and-tools/tool-use/handle-tool-calls" text:style-name="Internet_20_link" text:visited-style-name="Visited_20_Internet_20_Link">https://platform.claude.com/docs/en/agents-and-tools/tool-use/handle-tool-calls</text:a></text:p>
      <text:p text:style-name="Standard"><text:a xlink:type="simple" xlink:href="https://platform.claude.com/docs/en/agents-and-tools/tool-use/parallel-tool-use" text:style-name="Internet_20_link" text:visited-style-name="Visited_20_Internet_20_Link">https://platform.claude.com/docs/en/agents-and-tools/tool-use/parallel-tool-use</text:a></text:p>
      <text:p text:style-name="Standard"><text:a xlink:type="simple" xlink:href="https://platform.claude.com/docs/en/agents-and-tools/tool-use/tool-runner" text:style-name="Internet_20_link" text:visited-style-name="Visited_20_Internet_20_Link">https://platform.claude.com/docs/en/agents-and-tools/tool-use/tool-runner</text:a></text:p>
      <text:p text:style-name="Standard"><text:a xlink:type="simple" xlink:href="https://platform.claude.com/docs/en/agents-and-tools/tool-use/strict-tool-use" text:style-name="Internet_20_link" text:visited-style-name="Visited_20_Internet_20_Link">https://platform.claude.com/docs/en/agents-and-tools/tool-use/strict-tool-use</text:a></text:p>
      <text:p text:style-name="Standard"><text:a xlink:type="simple" xlink:href="https://platform.claude.com/docs/en/agents-and-tools/tool-use/tool-use-with-prompt-caching" text:style-name="Internet_20_link" text:visited-style-name="Visited_20_Internet_20_Link">https://platform.claude.com/docs/en/agents-and-tools/tool-use/tool-use-with-prompt-caching</text:a></text:p>
      <text:p text:style-name="Standard"><text:a xlink:type="simple" xlink:href="https://platform.claude.com/docs/en/agents-and-tools/tool-use/server-tools" text:style-name="Internet_20_link" text:visited-style-name="Visited_20_Internet_20_Link">https://platform.claude.com/docs/en/agents-and-tools/tool-use/server-tools</text:a></text:p>
      <text:p text:style-name="Standard"><text:a xlink:type="simple" xlink:href="https://platform.claude.com/docs/en/agents-and-tools/tool-use/troubleshooting-tool-use" text:style-name="Internet_20_link" text:visited-style-name="Visited_20_Internet_20_Link">https://platform.claude.com/docs/en/agents-and-tools/tool-use/troubleshooting-tool-use</text:a></text:p>
      <text:p text:style-name="Standard"><text:a xlink:type="simple" xlink:href="https://platform.claude.com/docs/en/agents-and-tools/tool-use/web-search-tool" text:style-name="Internet_20_link" text:visited-style-name="Visited_20_Internet_20_Link">https://platform.claude.com/docs/en/agents-and-tools/tool-use/web-search-tool</text:a></text:p>
      <text:p text:style-name="Standard"><text:a xlink:type="simple" xlink:href="https://platform.claude.com/docs/en/agents-and-tools/tool-use/web-fetch-tool" text:style-name="Internet_20_link" text:visited-style-name="Visited_20_Internet_20_Link">https://platform.claude.com/docs/en/agents-and-tools/tool-use/web-fetch-tool</text:a></text:p>
      <text:p text:style-name="Standard"><text:a xlink:type="simple" xlink:href="https://platform.claude.com/docs/en/agents-and-tools/tool-use/code-execution-tool" text:style-name="Internet_20_link" text:visited-style-name="Visited_20_Internet_20_Link">https://platform.claude.com/docs/en/agents-and-tools/tool-use/code-execution-tool</text:a></text:p>
      <text:p text:style-name="Standard"><text:a xlink:type="simple" xlink:href="https://platform.claude.com/docs/en/agents-and-tools/tool-use/advisor-tool" text:style-name="Internet_20_link" text:visited-style-name="Visited_20_Internet_20_Link">https://platform.claude.com/docs/en/agents-and-tools/tool-use/advisor-tool</text:a></text:p>
      <text:p text:style-name="Standard"><text:a xlink:type="simple" xlink:href="https://platform.claude.com/docs/en/agents-and-tools/tool-use/memory-tool" text:style-name="Internet_20_link" text:visited-style-name="Visited_20_Internet_20_Link">https://platform.claude.com/docs/en/agents-and-tools/tool-use/memory-tool</text:a></text:p>
      <text:p text:style-name="Standard"><text:a xlink:type="simple" xlink:href="https://platform.claude.com/docs/en/agents-and-tools/tool-use/bash-tool" text:style-name="Internet_20_link" text:visited-style-name="Visited_20_Internet_20_Link">https://platform.claude.com/docs/en/agents-and-tools/tool-use/bash-tool</text:a></text:p>
      <text:p text:style-name="Standard"><text:a xlink:type="simple" xlink:href="https://platform.claude.com/docs/en/agents-and-tools/tool-use/computer-use-tool" text:style-name="Internet_20_link" text:visited-style-name="Visited_20_Internet_20_Link">https://platform.claude.com/docs/en/agents-and-tools/tool-use/computer-use-tool</text:a></text:p>
      <text:p text:style-name="Standard"><text:a xlink:type="simple" xlink:href="https://platform.claude.com/docs/en/agents-and-tools/tool-use/text-editor-tool" text:style-name="Internet_20_link" text:visited-style-name="Visited_20_Internet_20_Link">https://platform.claude.com/docs/en/agents-and-tools/tool-use/text-editor-tool</text:a></text:p>
      <text:p text:style-name="Standard"><text:a xlink:type="simple" xlink:href="https://platform.claude.com/docs/en/agents-and-tools/tool-use/tool-reference" text:style-name="Internet_20_link" text:visited-style-name="Visited_20_Internet_20_Link">https://platform.claude.com/docs/en/agents-and-tools/tool-use/tool-reference</text:a></text:p>
      <text:p text:style-name="Standard"><text:a xlink:type="simple" xlink:href="https://platform.claude.com/docs/en/agents-and-tools/tool-use/manage-tool-context" text:style-name="Internet_20_link" text:visited-style-name="Visited_20_Internet_20_Link">https://platform.claude.com/docs/en/agents-and-tools/tool-use/manage-tool-context</text:a></text:p>
      <text:p text:style-name="Standard"><text:a xlink:type="simple" xlink:href="https://platform.claude.com/docs/en/agents-and-tools/tool-use/tool-combinations" text:style-name="Internet_20_link" text:visited-style-name="Visited_20_Internet_20_Link">https://platform.claude.com/docs/en/agents-and-tools/tool-use/tool-combinations</text:a></text:p>
      <text:p text:style-name="Standard"><text:a xlink:type="simple" xlink:href="https://platform.claude.com/docs/en/agents-and-tools/tool-use/tool-search-tool" text:style-name="Internet_20_link" text:visited-style-name="Visited_20_Internet_20_Link">https://platform.claude.com/docs/en/agents-and-tools/tool-use/tool-search-tool</text:a></text:p>
      <text:p text:style-name="Standard"><text:a xlink:type="simple" xlink:href="https://platform.claude.com/docs/en/agents-and-tools/tool-use/programmatic-tool-calling" text:style-name="Internet_20_link" text:visited-style-name="Visited_20_Internet_20_Link">https://platform.claude.com/docs/en/agents-and-tools/tool-use/programmatic-tool-calling</text:a></text:p>
      <text:p text:style-name="Standard"><text:a xlink:type="simple" xlink:href="https://platform.claude.com/docs/en/agents-and-tools/tool-use/fine-grained-tool-streaming" text:style-name="Internet_20_link" text:visited-style-name="Visited_20_Internet_20_Link">https://platform.claude.com/docs/en/agents-and-tools/tool-use/fine-grained-tool-streaming</text:a></text:p>
      <text:p text:style-name="Standard"><text:a xlink:type="simple" xlink:href="https://platform.claude.com/docs/en/build-with-claude/context-windows" text:style-name="Internet_20_link" text:visited-style-name="Visited_20_Internet_20_Link">https://platform.claude.com/docs/en/build-with-claude/context-windows</text:a></text:p>
      <text:p text:style-name="Standard"><text:a xlink:type="simple" xlink:href="https://platform.claude.com/docs/en/build-with-claude/compaction" text:style-name="Internet_20_link" text:visited-style-name="Visited_20_Internet_20_Link">https://platform.claude.com/docs/en/build-with-claude/compaction</text:a></text:p>
      <text:p text:style-name="Standard"><text:a xlink:type="simple" xlink:href="https://platform.claude.com/docs/en/build-with-claude/context-editing" text:style-name="Internet_20_link" text:visited-style-name="Visited_20_Internet_20_Link">https://platform.claude.com/docs/en/build-with-claude/context-editing</text:a></text:p>
      <text:p text:style-name="Standard"><text:a xlink:type="simple" xlink:href="https://platform.claude.com/docs/en/build-with-claude/prompt-caching" text:style-name="Internet_20_link" text:visited-style-name="Visited_20_Internet_20_Link">https://platform.claude.com/docs/en/build-with-claude/prompt-caching</text:a></text:p>
      <text:p text:style-name="Standard"><text:a xlink:type="simple" xlink:href="https://platform.claude.com/docs/en/build-with-claude/mid-conversation-system-messages" text:style-name="Internet_20_link" text:visited-style-name="Visited_20_Internet_20_Link">https://platform.claude.com/docs/en/build-with-claude/mid-conversation-system-messages</text:a></text:p>
      <text:p text:style-name="Standard"><text:a xlink:type="simple" xlink:href="https://platform.claude.com/docs/en/build-with-claude/mid-conversation-effort-example" text:style-name="Internet_20_link" text:visited-style-name="Visited_20_Internet_20_Link">https://platform.claude.com/docs/en/build-with-claude/mid-conversation-effort-example</text:a></text:p>
      <text:p text:style-name="Standard"><text:a xlink:type="simple" xlink:href="https://platform.claude.com/docs/en/build-with-claude/cache-diagnostics" text:style-name="Internet_20_link" text:visited-style-name="Visited_20_Internet_20_Link"><text:soft-page-break/>https://platform.claude.com/docs/en/build-with-claude/cache-diagnostics</text:a></text:p>
      <text:p text:style-name="Standard"><text:a xlink:type="simple" xlink:href="https://platform.claude.com/docs/en/build-with-claude/token-counting" text:style-name="Internet_20_link" text:visited-style-name="Visited_20_Internet_20_Link">https://platform.claude.com/docs/en/build-with-claude/token-counting</text:a></text:p>
      <text:p text:style-name="Standard"><text:a xlink:type="simple" xlink:href="https://platform.claude.com/docs/en/build-with-claude/files" text:style-name="Internet_20_link" text:visited-style-name="Visited_20_Internet_20_Link">https://platform.claude.com/docs/en/build-with-claude/files</text:a><text:line-break/><text:a xlink:type="simple" xlink:href="https://platform.claude.com/docs/en/build-with-claude/pdf-support" text:style-name="Internet_20_link" text:visited-style-name="Visited_20_Internet_20_Link">https://platform.claude.com/docs/en/build-with-claude/pdf-support</text:a></text:p>
      <text:p text:style-name="Standard"><text:a xlink:type="simple" xlink:href="https://platform.claude.com/docs/en/build-with-claude/vision" text:style-name="Internet_20_link" text:visited-style-name="Visited_20_Internet_20_Link">https://platform.claude.com/docs/en/build-with-claude/vision</text:a></text:p>
      <text:p text:style-name="Standard"><text:a xlink:type="simple" xlink:href="https://platform.claude.com/docs/en/agents-and-tools/agent-skills/overview" text:style-name="Internet_20_link" text:visited-style-name="Visited_20_Internet_20_Link">https://platform.claude.com/docs/en/agents-and-tools/agent-skills/overview</text:a></text:p>
      <text:p text:style-name="Standard"><text:a xlink:type="simple" xlink:href="https://platform.claude.com/docs/en/agents-and-tools/agent-skills/quickstart" text:style-name="Internet_20_link" text:visited-style-name="Visited_20_Internet_20_Link">https://platform.claude.com/docs/en/agents-and-tools/agent-skills/quickstart</text:a></text:p>
      <text:p text:style-name="Standard"><text:a xlink:type="simple" xlink:href="https://platform.claude.com/docs/en/agents-and-tools/agent-skills/best-practices" text:style-name="Internet_20_link" text:visited-style-name="Visited_20_Internet_20_Link">https://platform.claude.com/docs/en/agents-and-tools/agent-skills/best-practices</text:a></text:p>
      <text:p text:style-name="Standard"><text:a xlink:type="simple" xlink:href="https://platform.claude.com/docs/en/agents-and-tools/agent-skills/enterprise" text:style-name="Internet_20_link" text:visited-style-name="Visited_20_Internet_20_Link">https://platform.claude.com/docs/en/agents-and-tools/agent-skills/enterprise</text:a></text:p>
      <text:p text:style-name="Standard"><text:a xlink:type="simple" xlink:href="https://platform.claude.com/docs/en/build-with-claude/skills-guide" text:style-name="Internet_20_link" text:visited-style-name="Visited_20_Internet_20_Link">https://platform.claude.com/docs/en/build-with-claude/skills-guide</text:a></text:p>
      <text:p text:style-name="Standard"><text:a xlink:type="simple" xlink:href="https://platform.claude.com/docs/en/agents-and-tools/remote-mcp-servers" text:style-name="Internet_20_link" text:visited-style-name="Visited_20_Internet_20_Link">https://platform.claude.com/docs/en/agents-and-tools/remote-mcp-servers</text:a></text:p>
      <text:p text:style-name="Standard"><text:a xlink:type="simple" xlink:href="https://platform.claude.com/docs/en/agents-and-tools/mcp-connector" text:style-name="Internet_20_link" text:visited-style-name="Visited_20_Internet_20_Link">https://platform.claude.com/docs/en/agents-and-tools/mcp-connector</text:a></text:p>
      <text:p text:style-name="Standard"><text:a xlink:type="simple" xlink:href="https://platform.claude.com/docs/en/agents-and-tools/mcp-tunnels/overview" text:style-name="Internet_20_link" text:visited-style-name="Visited_20_Internet_20_Link">https://platform.claude.com/docs/en/agents-and-tools/mcp-tunnels/overview</text:a></text:p>
      <text:p text:style-name="Standard"><text:a xlink:type="simple" xlink:href="https://platform.claude.com/docs/en/agents-and-tools/mcp-tunnels/concepts" text:style-name="Internet_20_link" text:visited-style-name="Visited_20_Internet_20_Link">https://platform.claude.com/docs/en/agents-and-tools/mcp-tunnels/concepts</text:a></text:p>
      <text:p text:style-name="Standard"><text:a xlink:type="simple" xlink:href="https://platform.claude.com/docs/en/agents-and-tools/mcp-tunnels/quickstart" text:style-name="Internet_20_link" text:visited-style-name="Visited_20_Internet_20_Link">https://platform.claude.com/docs/en/agents-and-tools/mcp-tunnels/quickstart</text:a></text:p>
      <text:p text:style-name="Standard"><text:a xlink:type="simple" xlink:href="https://platform.claude.com/docs/en/agents-and-tools/mcp-tunnels/console" text:style-name="Internet_20_link" text:visited-style-name="Visited_20_Internet_20_Link">https://platform.claude.com/docs/en/agents-and-tools/mcp-tunnels/console</text:a></text:p>
      <text:p text:style-name="Standard"><text:a xlink:type="simple" xlink:href="https://platform.claude.com/docs/en/agents-and-tools/mcp-tunnels/deploy-helm" text:style-name="Internet_20_link" text:visited-style-name="Visited_20_Internet_20_Link">https://platform.claude.com/docs/en/agents-and-tools/mcp-tunnels/deploy-helm</text:a></text:p>
      <text:p text:style-name="Standard"><text:a xlink:type="simple" xlink:href="https://platform.claude.com/docs/en/agents-and-tools/mcp-tunnels/deploy-compose" text:style-name="Internet_20_link" text:visited-style-name="Visited_20_Internet_20_Link">https://platform.claude.com/docs/en/agents-and-tools/mcp-tunnels/deploy-compose</text:a></text:p>
      <text:p text:style-name="Standard"><text:a xlink:type="simple" xlink:href="https://platform.claude.com/docs/en/agents-and-tools/mcp-tunnels/security" text:style-name="Internet_20_link" text:visited-style-name="Visited_20_Internet_20_Link">https://platform.claude.com/docs/en/agents-and-tools/mcp-tunnels/security</text:a></text:p>
      <text:p text:style-name="Standard"><text:a xlink:type="simple" xlink:href="https://platform.claude.com/docs/en/agents-and-tools/mcp-tunnels/troubleshooting" text:style-name="Internet_20_link" text:visited-style-name="Visited_20_Internet_20_Link">https://platform.claude.com/docs/en/agents-and-tools/mcp-tunnels/troubleshooting</text:a></text:p>
      <text:p text:style-name="Standard"><text:a xlink:type="simple" xlink:href="https://platform.claude.com/docs/en/agents-and-tools/mcp-tunnels/reference" text:style-name="Internet_20_link" text:visited-style-name="Visited_20_Internet_20_Link">https://platform.claude.com/docs/en/agents-and-tools/mcp-tunnels/reference</text:a></text:p>
      <text:p text:style-name="Standard"><text:a xlink:type="simple" xlink:href="https://platform.claude.com/docs/en/build-with-claude/claude-in-amazon-bedrock" text:style-name="Internet_20_link" text:visited-style-name="Visited_20_Internet_20_Link">https://platform.claude.com/docs/en/build-with-claude/claude-in-amazon-bedrock</text:a></text:p>
      <text:p text:style-name="Standard"><text:a xlink:type="simple" xlink:href="https://platform.claude.com/docs/en/build-with-claude/claude-on-amazon-bedrock-legacy" text:style-name="Internet_20_link" text:visited-style-name="Visited_20_Internet_20_Link">https://platform.claude.com/docs/en/build-with-claude/claude-on-amazon-bedrock-legacy</text:a></text:p>
      <text:p text:style-name="Standard"><text:a xlink:type="simple" xlink:href="https://platform.claude.com/docs/en/build-with-claude/claude-platform-on-aws" text:style-name="Internet_20_link" text:visited-style-name="Visited_20_Internet_20_Link">https://platform.claude.com/docs/en/build-with-claude/claude-platform-on-aws</text:a></text:p>
      <text:p text:style-name="Standard"><text:a xlink:type="simple" xlink:href="https://platform.claude.com/docs/en/build-with-claude/claude-in-microsoft-foundry" text:style-name="Internet_20_link" text:visited-style-name="Visited_20_Internet_20_Link">https://platform.claude.com/docs/en/build-with-claude/claude-in-microsoft-foundry</text:a></text:p>
      <text:p text:style-name="Standard"><text:a xlink:type="simple" xlink:href="https://platform.claude.com/docs/en/build-with-claude/claude-on-vertex-ai" text:style-name="Internet_20_link" text:visited-style-name="Visited_20_Internet_20_Link">https://platform.claude.com/docs/en/build-with-claude/claude-on-vertex-ai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5T20:58:43.841848167</meta:creation-date>
    <dc:date>2026-06-15T21:06:41.290490768</dc:date>
    <meta:editing-duration>PT7M58S</meta:editing-duration>
    <meta:editing-cycles>1</meta:editing-cycles>
    <meta:document-statistic meta:table-count="0" meta:image-count="0" meta:object-count="0" meta:page-count="2" meta:paragraph-count="76" meta:word-count="77" meta:character-count="5659" meta:non-whitespace-character-count="5658"/>
    <meta:generator>LibreOffice/24.2.7.2$Linux_X86_64 LibreOffice_project/420$Build-2</meta:generator>
  </office:meta>
</office:document-meta>
</file>